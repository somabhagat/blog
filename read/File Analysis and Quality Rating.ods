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9102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1.6335in"/>
    </style:style>
    <style:style style:name="co5" style:family="table-column">
      <style:table-column-properties fo:break-before="auto" style:column-width="4.60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ile_20_Analysis_20_and_20_Quality_20_Rating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le Analysis and Quality Ra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Length Status</text:p>
          </table:table-cell>
          <table:table-cell table:style-name="ce1" office:value-type="string" calcext:value-type="string">
            <text:p>Quality Rating (1–10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D1_PSD2_PSD3.html</text:p>
          </table:table-cell>
          <table:table-cell table:style-name="ce2" office:value-type="string" calcext:value-type="string">
            <text:p>Longest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Your "Master Post." Deeply technical and comprehensive.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wiss_Payments_Stack.html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Exceptional clarity. Best visual-to-text ratio for architects.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be_coding.html</text:p>
          </table:table-cell>
          <table:table-cell table:style-name="ce2" office:value-type="string" calcext:value-type="string">
            <text:p>Very Lon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est for personal branding and modern tech trends.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SD3.html</text:p>
          </table:table-cell>
          <table:table-cell table:style-name="ce2" office:value-type="string" calcext:value-type="string">
            <text:p>Medium-Long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Highly relevant for the current 2026 regulatory shift.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SD1.html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High-value technical breakdown of service categories.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PA.html</text:p>
          </table:table-cell>
          <table:table-cell table:style-name="ce2" office:value-type="string" calcext:value-type="string">
            <text:p>Short-Medium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string" calcext:value-type="string">
            <text:p>Essential historical context for EU payments.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SD2.html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olid, reliable info on SCA and Open Banking.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SO8583_ISO20022.html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string" calcext:value-type="string">
            <text:p>Precise technical comparison for engineers.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urviving.html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High quality for human interest/motivation.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aas.html</text:p>
          </table:table-cell>
          <table:table-cell table:style-name="ce2" office:value-type="string" calcext:value-type="string">
            <text:p>Very Shor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reat infographic style, but light on prose.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EPAold.html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Redundant version of the newer SEPA file.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antander...html</text:p>
          </table:table-cell>
          <table:table-cell table:style-name="ce2" office:value-type="string" calcext:value-type="string">
            <text:p>Shortes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inimal text; acts as a visual divider or asset.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File Analysis and Quality Rating'.A1:'File Analysis and Quality Rating'.E1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11:16:32.16947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le_20_Analysis_20_and_20_Quality_20_Rating" style:display-name="PageStyle_File Analysis and Quality Ra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24T11:18:37.454867700</dc:date>
    <meta:editing-duration>PT3M21S</meta:editing-duration>
    <meta:editing-cycles>3</meta:editing-cycles>
    <meta:document-statistic meta:table-count="1" meta:cell-count="65" meta:object-count="0"/>
  </office:meta>
</office:document-meta>
</file>